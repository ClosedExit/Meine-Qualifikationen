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f25c8" officeooo:paragraph-rsid="000f25c8"/>
    </style:style>
    <style:style style:name="P2" style:family="paragraph" style:parent-style-name="Standard">
      <style:paragraph-properties fo:text-align="center" style:justify-single-word="false"/>
      <style:text-properties style:font-name="Cantarell" officeooo:rsid="000f25c8" officeooo:paragraph-rsid="000f25c8"/>
    </style:style>
    <style:style style:name="P3" style:family="paragraph" style:parent-style-name="Standard">
      <style:paragraph-properties fo:text-align="start" style:justify-single-word="false"/>
      <style:text-properties style:font-name="Cantarell" officeooo:rsid="000f25c8" officeooo:paragraph-rsid="000f25c8"/>
    </style:style>
    <style:style style:name="P4" style:family="paragraph" style:parent-style-name="Standard">
      <style:paragraph-properties fo:text-align="start" style:justify-single-word="false"/>
      <style:text-properties style:font-name="Cantarell" officeooo:rsid="00154958" officeooo:paragraph-rsid="00154958"/>
    </style:style>
    <style:style style:name="P5" style:family="paragraph" style:parent-style-name="Standard">
      <style:paragraph-properties fo:text-align="start" style:justify-single-word="false"/>
      <style:text-properties style:font-name="Cantarell" officeooo:rsid="0017e143" officeooo:paragraph-rsid="001a8567"/>
    </style:style>
    <style:style style:name="P6" style:family="paragraph" style:parent-style-name="Standard">
      <style:paragraph-properties fo:text-align="start" style:justify-single-word="false"/>
      <style:text-properties style:font-name="Cantarell" officeooo:rsid="001a8567" officeooo:paragraph-rsid="001a8567"/>
    </style:style>
    <style:style style:name="P7" style:family="paragraph" style:parent-style-name="Standard">
      <style:paragraph-properties fo:text-align="start" style:justify-single-word="false"/>
      <style:text-properties style:font-name="Cantarell" officeooo:rsid="001b3480" officeooo:paragraph-rsid="001b3480"/>
    </style:style>
    <style:style style:name="P8" style:family="paragraph" style:parent-style-name="Standard">
      <style:paragraph-properties fo:text-align="start" style:justify-single-word="false"/>
      <style:text-properties style:font-name="Cantarell" officeooo:rsid="0017e143" officeooo:paragraph-rsid="001a8567"/>
    </style:style>
    <style:style style:name="P9" style:family="paragraph" style:parent-style-name="Standard">
      <style:paragraph-properties fo:text-align="start" style:justify-single-word="false"/>
      <style:text-properties style:font-name="Cantarell" officeooo:rsid="00154958" officeooo:paragraph-rsid="00154958"/>
    </style:style>
    <style:style style:name="T1" style:family="text">
      <style:text-properties officeooo:rsid="0015d739"/>
    </style:style>
    <style:style style:name="T2" style:family="text">
      <style:text-properties officeooo:rsid="0017e143"/>
    </style:style>
    <style:style style:name="T3" style:family="text">
      <style:text-properties officeooo:rsid="00192cfa"/>
    </style:style>
    <style:style style:name="T4" style:family="text">
      <style:text-properties officeooo:rsid="0019cce1"/>
    </style:style>
    <style:style style:name="T5" style:family="text">
      <style:text-properties officeooo:rsid="001b3480"/>
    </style:style>
    <style:style style:name="T6" style:family="text">
      <style:text-properties officeooo:rsid="001d239c"/>
    </style:style>
    <style:style style:name="T7" style:family="text">
      <style:text-properties officeooo:rsid="001ec9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Zeitreport</text:p>
      <text:p text:style-name="P3">D<text:span text:style-name="T2">ON</text:span> <text:span text:style-name="T4">8</text:span>. <text:span text:style-name="T4">Mai</text:span>:</text:p>
      <text:p text:style-name="P3">In: --:--</text:p>
      <text:p text:style-name="P3">Out: <text:span text:style-name="T7">15</text:span>:<text:span text:style-name="T4">5</text:span>0 (letzte <text:span text:style-name="T6">5</text:span>min report)</text:p>
      <text:p text:style-name="P4"><text:s text:c="2"/></text:p>
      <text:p text:style-name="P4"/>
      <text:p text:style-name="P4"/>
      <text:p text:style-name="P4"><text:span text:style-name="T7">15</text:span>:<text:span text:style-name="T7">5</text:span><text:span text:style-name="T6">0</text:span></text:p>
      <text:p text:style-name="P4">mit freundlichen Grüßen</text:p>
      <text:p text:style-name="P4">Alex</text:p>
      <text:p text:style-name="P1"><text:s text:c="8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13:53:43.299446517</meta:creation-date>
    <dc:date>2026-05-08T14:00:45.202469917</dc:date>
    <meta:editing-duration>PT23M3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7" meta:character-count="179" meta:non-whitespace-character-count="84"/>
  </office:meta>
</office:document-meta>
</file>