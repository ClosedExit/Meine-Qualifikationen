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257EF809B2A55E1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ntarell" officeooo:rsid="0006982c" officeooo:paragraph-rsid="0006982c"/>
    </style:style>
    <style:style style:name="P2" style:family="paragraph" style:parent-style-name="Standard">
      <style:paragraph-properties fo:text-align="start" style:justify-single-word="false"/>
      <style:text-properties style:font-name="Cantarell" officeooo:rsid="0006982c" officeooo:paragraph-rsid="0006982c"/>
    </style:style>
    <style:style style:name="P3" style:family="paragraph" style:parent-style-name="Standard">
      <style:paragraph-properties fo:text-align="start" style:justify-single-word="false"/>
      <style:text-properties style:font-name="Cantarell" officeooo:rsid="0006c3f5" officeooo:paragraph-rsid="0006c3f5"/>
    </style:style>
    <style:style style:name="P4" style:family="paragraph" style:parent-style-name="Standard">
      <style:paragraph-properties fo:text-align="start" style:justify-single-word="false"/>
      <style:text-properties style:font-name="Cantarell" officeooo:rsid="0008ad6f" officeooo:paragraph-rsid="000bac86"/>
    </style:style>
    <style:style style:name="P5" style:family="paragraph" style:parent-style-name="Standard">
      <style:paragraph-properties fo:text-align="start" style:justify-single-word="false"/>
      <style:text-properties style:font-name="Cantarell" officeooo:rsid="000ca4af" officeooo:paragraph-rsid="000ca4af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Cantarell" officeooo:rsid="0006982c" officeooo:paragraph-rsid="0006982c"/>
    </style:style>
    <style:style style:name="P7" style:family="paragraph" style:parent-style-name="Standard" style:list-style-name="L2">
      <style:paragraph-properties fo:text-align="start" style:justify-single-word="false"/>
      <style:text-properties style:font-name="Cantarell" officeooo:rsid="0006982c" officeooo:paragraph-rsid="0006982c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Cantarell" fo:font-weight="bold" officeooo:rsid="0006982c" officeooo:paragraph-rsid="0006982c" style:font-weight-asian="bold" style:font-weight-complex="bold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Cantarell" fo:font-weight="bold" officeooo:rsid="0006c3f5" officeooo:paragraph-rsid="0006c3f5" style:font-weight-asian="bold" style:font-weight-complex="bold"/>
    </style:style>
    <style:style style:name="P10" style:family="paragraph" style:parent-style-name="Standard" style:list-style-name="L3">
      <style:paragraph-properties fo:text-align="start" style:justify-single-word="false"/>
      <style:text-properties style:font-name="Cantarell" fo:font-weight="bold" officeooo:rsid="0008ad6f" officeooo:paragraph-rsid="0011b6ee" style:font-weight-asian="bold" style:font-weight-complex="bold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Cantarell" officeooo:rsid="0006c3f5" officeooo:paragraph-rsid="0008ad6f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Cantarell" officeooo:rsid="0006c3f5" officeooo:paragraph-rsid="0013ac89"/>
    </style:style>
    <style:style style:name="P13" style:family="paragraph" style:parent-style-name="Standard" style:list-style-name="L3">
      <style:paragraph-properties fo:text-align="start" style:justify-single-word="false"/>
      <style:text-properties style:font-name="Cantarell" officeooo:rsid="0006c3f5" officeooo:paragraph-rsid="0006c3f5"/>
    </style:style>
    <style:style style:name="P14" style:family="paragraph" style:parent-style-name="Standard" style:list-style-name="L3">
      <style:paragraph-properties fo:text-align="start" style:justify-single-word="false"/>
      <style:text-properties style:font-name="Cantarell" officeooo:rsid="0008ad6f" officeooo:paragraph-rsid="000bac86"/>
    </style:style>
    <style:style style:name="P15" style:family="paragraph" style:parent-style-name="Standard" style:list-style-name="L3">
      <style:paragraph-properties fo:text-align="start" style:justify-single-word="false"/>
      <style:text-properties style:font-name="Cantarell" officeooo:rsid="0008ad6f" officeooo:paragraph-rsid="000cf2ee"/>
    </style:style>
    <style:style style:name="P16" style:family="paragraph" style:parent-style-name="Standard" style:list-style-name="L3">
      <style:paragraph-properties fo:text-align="start" style:justify-single-word="false"/>
      <style:text-properties style:font-name="Cantarell" officeooo:rsid="0008ad6f" officeooo:paragraph-rsid="0011b6ee"/>
    </style:style>
    <style:style style:name="P17" style:family="paragraph" style:parent-style-name="Standard" style:list-style-name="L3">
      <style:paragraph-properties fo:text-align="start" style:justify-single-word="false"/>
      <style:text-properties style:font-name="Cantarell" fo:font-weight="normal" officeooo:rsid="00141f1c" officeooo:paragraph-rsid="00141f1c" style:font-weight-asian="normal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style:font-name="Cantarell" officeooo:rsid="000ca4af" officeooo:paragraph-rsid="000ca4af"/>
    </style:style>
    <style:style style:name="P19" style:family="paragraph" style:parent-style-name="Standard" style:list-style-name="L4">
      <style:paragraph-properties fo:text-align="start" style:justify-single-word="false"/>
      <style:text-properties style:font-name="Cantarell" officeooo:rsid="000ca4af" officeooo:paragraph-rsid="000dc1bd"/>
    </style:style>
    <style:style style:name="P20" style:family="paragraph" style:parent-style-name="Standard" style:list-style-name="L4">
      <style:paragraph-properties fo:text-align="start" style:justify-single-word="false"/>
      <style:text-properties style:font-name="Cantarell" officeooo:rsid="000ca4af" officeooo:paragraph-rsid="0010a965"/>
    </style:style>
    <style:style style:name="P21" style:family="paragraph" style:parent-style-name="Standard">
      <style:paragraph-properties fo:text-align="start" style:justify-single-word="false"/>
      <style:text-properties style:font-name="Cantarell" officeooo:rsid="000ca4af" officeooo:paragraph-rsid="000ca4af"/>
    </style:style>
    <style:style style:name="P22" style:family="paragraph" style:parent-style-name="Standard" style:list-style-name="L3">
      <style:paragraph-properties fo:text-align="start" style:justify-single-word="false"/>
      <style:text-properties fo:color="#000000" loext:opacity="100%" style:font-name="Cantarell" officeooo:rsid="0011b6ee" officeooo:paragraph-rsid="0011b6ee"/>
    </style:style>
    <style:style style:name="P23" style:family="paragraph" style:parent-style-name="Standard" style:list-style-name="L4">
      <style:paragraph-properties fo:text-align="start" style:justify-single-word="false"/>
      <style:text-properties fo:color="#000000" loext:opacity="100%" style:font-name="Cantarell" fo:font-weight="bold" officeooo:rsid="000ca4af" officeooo:paragraph-rsid="000ca4af" style:font-weight-asian="bold" style:font-weight-complex="bold"/>
    </style:style>
    <style:style style:name="P24" style:family="paragraph" style:parent-style-name="Standard" style:list-style-name="L4">
      <style:paragraph-properties fo:text-align="start" style:justify-single-word="false"/>
      <style:text-properties fo:color="#000000" loext:opacity="100%" style:font-name="Cantarell" officeooo:rsid="000ca4af" officeooo:paragraph-rsid="000ca4af"/>
    </style:style>
    <style:style style:name="P25" style:family="paragraph" style:parent-style-name="Standard" style:list-style-name="L4">
      <style:paragraph-properties fo:text-align="start" style:justify-single-word="false"/>
      <style:text-properties officeooo:paragraph-rsid="000ca4af"/>
    </style:style>
    <style:style style:name="P26" style:family="paragraph" style:parent-style-name="Standard" style:list-style-name="L4">
      <style:paragraph-properties fo:text-align="start" style:justify-single-word="false"/>
      <style:text-properties officeooo:rsid="000cf2ee" officeooo:paragraph-rsid="000cf2ee"/>
    </style:style>
    <style:style style:name="T1" style:family="text">
      <style:text-properties style:font-name="Cantarell"/>
    </style:style>
    <style:style style:name="T2" style:family="text">
      <style:text-properties style:font-name="Cantarell" fo:font-weight="bold" officeooo:rsid="000ca4af" style:font-weight-asian="bold" style:font-weight-complex="bold"/>
    </style:style>
    <style:style style:name="T3" style:family="text">
      <style:text-properties style:font-name="Cantarell" officeooo:rsid="000ca4af"/>
    </style:style>
    <style:style style:name="T4" style:family="text">
      <style:text-properties officeooo:rsid="0006c3f5"/>
    </style:style>
    <style:style style:name="T5" style:family="text">
      <style:text-properties officeooo:rsid="0008ad6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6982c" style:font-weight-asian="bold" style:font-weight-complex="bold"/>
    </style:style>
    <style:style style:name="T8" style:family="text">
      <style:text-properties fo:font-weight="bold" officeooo:rsid="0006c3f5" style:font-weight-asian="bold" style:font-weight-complex="bold"/>
    </style:style>
    <style:style style:name="T9" style:family="text">
      <style:text-properties officeooo:rsid="000bac86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6982c" style:font-weight-asian="normal" style:font-weight-complex="normal"/>
    </style:style>
    <style:style style:name="T12" style:family="text">
      <style:text-properties fo:font-weight="normal" officeooo:rsid="000bac86" style:font-weight-asian="normal" style:font-weight-complex="normal"/>
    </style:style>
    <style:style style:name="T13" style:family="text">
      <style:text-properties fo:font-weight="normal" officeooo:rsid="001653ad" style:font-weight-asian="normal" style:font-weight-complex="normal"/>
    </style:style>
    <style:style style:name="T14" style:family="text">
      <style:text-properties officeooo:rsid="000ca4af"/>
    </style:style>
    <style:style style:name="T15" style:family="text">
      <style:text-properties fo:color="#000000" loext:opacity="100%"/>
    </style:style>
    <style:style style:name="T16" style:family="text">
      <style:text-properties fo:color="#000000" loext:opacity="100%" fo:font-weight="bold" style:font-weight-asian="bold" style:font-weight-complex="bold"/>
    </style:style>
    <style:style style:name="T17" style:family="text">
      <style:text-properties fo:color="#000000" loext:opacity="100%" fo:font-weight="bold" officeooo:rsid="000ca4af" style:font-weight-asian="bold" style:font-weight-complex="bold"/>
    </style:style>
    <style:style style:name="T18" style:family="text">
      <style:text-properties fo:color="#000000" loext:opacity="100%" officeooo:rsid="000ca4af"/>
    </style:style>
    <style:style style:name="T19" style:family="text">
      <style:text-properties fo:color="#000000" loext:opacity="100%" officeooo:rsid="0011b6ee"/>
    </style:style>
    <style:style style:name="T20" style:family="text">
      <style:text-properties fo:color="#70b8ff" loext:opacity="100%"/>
    </style:style>
    <style:style style:name="T21" style:family="text">
      <style:text-properties fo:color="#70b8ff" loext:opacity="100%" fo:font-weight="bold" style:font-weight-asian="bold" style:font-weight-complex="bold"/>
    </style:style>
    <style:style style:name="T22" style:family="text">
      <style:text-properties fo:color="#70b8ff" loext:opacity="100%" style:font-name="Cantarell" fo:font-weight="bold" officeooo:rsid="000ca4af" style:font-weight-asian="bold" style:font-weight-complex="bold"/>
    </style:style>
    <style:style style:name="T23" style:family="text">
      <style:text-properties officeooo:rsid="000dc1bd"/>
    </style:style>
    <style:style style:name="T24" style:family="text">
      <style:text-properties officeooo:rsid="0010a965"/>
    </style:style>
    <style:style style:name="T25" style:family="text">
      <style:text-properties officeooo:rsid="0011b6ee"/>
    </style:style>
    <style:style style:name="T26" style:family="text">
      <style:text-properties officeooo:rsid="0013ac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– Erste Schritte</text:p>
      <text:p text:style-name="P2"/>
      <text:list xml:id="list2684136375" text:style-name="L1">
        <text:list-item>
          <text:p text:style-name="P6">Erstelle ein neues Repository auf Git.</text:p>
        </text:list-item>
      </text:list>
      <text:p text:style-name="P2"/>
      <text:p text:style-name="P2">Lokal im Bash-shell:</text:p>
      <text:list xml:id="list131809834137859" text:continue-numbering="true" text:style-name="L1">
        <text:list-item>
          <text:p text:style-name="P6"><text:span text:style-name="T6">Git clone</text:span> &lt;<text:span text:style-name="T6">link</text:span>&gt;</text:p>
          <text:list>
            <text:list-item>
              <text:p text:style-name="P6">Nutzername und Passwort wird jedes Mal erfragt vor dem pushen</text:p>
            </text:list-item>
          </text:list>
        </text:list-item>
        <text:list-item>
          <text:p text:style-name="P6">cd in den lokalen branch des Repositories (Git-repo-ordner)</text:p>
          <text:p text:style-name="P6"><text:s text:c="44"/></text:p>
        </text:list-item>
      </text:list>
      <text:p text:style-name="P2">Im lokalen branch:</text:p>
      <text:list xml:id="list3601022515" text:style-name="L2">
        <text:list-item>
          <text:p text:style-name="P7"><text:span text:style-name="T6">git add</text:span> <text:s/>&lt;<text:span text:style-name="T6">datei</text:span>&gt; oder &lt;<text:span text:style-name="T6">ordner</text:span>&gt; oder &lt;<text:span text:style-name="T6">.</text:span>&gt; </text:p>
          <text:list>
            <text:list-item>
              <text:p text:style-name="P7"><text:span text:style-name="T6">.</text:span> <text:s/>steht für alle Änderungen zusammen</text:p>
            </text:list-item>
          </text:list>
        </text:list-item>
        <text:list-item>
          <text:p text:style-name="P8">git commit -m „Nachricht“</text:p>
        </text:list-item>
        <text:list-item>
          <text:p text:style-name="P8">git push -u origin main</text:p>
          <text:list>
            <text:list-item>
              <text:p text:style-name="P7">-u bedeutet upstream zum main repo</text:p>
            </text:list-item>
            <text:list-item>
              <text:p text:style-name="P7">setzt das lokale repository dauerhaft als Nebenzweig</text:p>
            </text:list-item>
          </text:list>
        </text:list-item>
        <text:list-item>
          <text:p text:style-name="P9">git remote -v</text:p>
          <text:list>
            <text:list-item>
              <text:p text:style-name="P11">um zu erfragen, ob git-repository https oder ssh nutzt</text:p>
            </text:list-item>
            <text:list-item>
              <text:p text:style-name="P12"><text:span text:style-name="T5">https bei https oder </text:span><text:a xlink:type="simple" xlink:href="mailto:git@git" text:style-name="Internet_20_link" text:visited-style-name="Visited_20_Internet_20_Link"><text:span text:style-name="T5">git@git</text:span></text:a><text:span text:style-name="T5"> bei ssh</text:span> </text:p>
            </text:list-item>
            <text:list-item>
              <text:p text:style-name="P12">-<text:span text:style-name="T26">v um ausführliche unterscheidung zu</text:span> <text:span text:style-name="T26">erhalten</text:span> <text:s text:c="35"/></text:p>
            </text:list-item>
          </text:list>
        </text:list-item>
      </text:list>
      <text:p text:style-name="P3"/>
      <text:p text:style-name="P3">ssh <text:span text:style-name="T14">(falls vorhanden)</text:span>:</text:p>
      <text:list xml:id="list2533005560" text:style-name="L3">
        <text:list-item>
          <text:p text:style-name="P13"><text:span text:style-name="T6">ssh -T </text:span>&lt;<text:span text:style-name="T6">link</text:span>&gt;</text:p>
          <text:list>
            <text:list-item>
              <text:p text:style-name="P14">zum testen auf eine erfolgreiche Verbindung <text:s text:c="129"/></text:p>
            </text:list-item>
            <text:list-item>
              <text:p text:style-name="P15"><text:span text:style-name="T9">danach eventuell erneut </text:span><text:span text:style-name="T7">git push -u origin main</text:span><text:span text:style-name="T11"> </text:span><text:span text:style-name="T12">ausführen</text:span> </text:p>
            </text:list-item>
          </text:list>
        </text:list-item>
        <text:list-item>
          <text:p text:style-name="P15"><text:s text:c="2"/><text:span text:style-name="T8">git remo</text:span><text:span text:style-name="T6">t</text:span><text:span text:style-name="T8">e set-url origin</text:span><text:span text:style-name="T4"> &lt;</text:span><text:span text:style-name="T8">link</text:span><text:span text:style-name="T4">&gt;</text:span></text:p>
          <text:list>
            <text:list-item>
              <text:p text:style-name="P16">befehle die nutzung von ssh falls vorhanden</text:p>
            </text:list-item>
          </text:list>
        </text:list-item>
        <text:list-item>
          <text:p text:style-name="P10"><text:span text:style-name="T20">ls</text:span> -la ~/.ssh/</text:p>
          <text:list>
            <text:list-item>
              <text:p text:style-name="P17">listet alle ssh keys in dem Verzeichnis auf </text:p>
            </text:list-item>
          </text:list>
        </text:list-item>
        <text:list-item>
          <text:p text:style-name="P16"><text:span text:style-name="T17">ssh-add ~/.ssh/</text:span><text:span text:style-name="T18">id_ed25519_github</text:span></text:p>
          <text:list>
            <text:list-item>
              <text:p text:style-name="P22">zusätzliche flags</text:p>
              <text:list>
                <text:list-item>
                  <text:p text:style-name="P22">-l<text:tab/>(list all keys)</text:p>
                </text:list-item>
                <text:list-item>
                  <text:p text:style-name="P22">-d<text:tab/>(delete specific key)</text:p>
                </text:list-item>
                <text:list-item>
                  <text:p text:style-name="P16"><text:span text:style-name="T19">-D</text:span> <text:s text:c="8"/><text:span text:style-name="T25">(delete all keys)</text:span> <text:s text:c="32"/></text:p>
                </text:list-item>
              </text:list>
            </text:list-item>
          </text:list>
        </text:list-item>
      </text:list>
      <text:p text:style-name="P4"><text:s text:c="165"/></text:p>
      <text:p text:style-name="P5">ssh (falls nicht vorhanden):</text:p>
      <text:list xml:id="list3979592147" text:style-name="L4">
        <text:list-item>
          <text:p text:style-name="P18"><text:span text:style-name="T6">ssh-keygen -t ed25519 -C "deine-email@example.com" -f ~/.ssh/</text:span>id_ed25519_github</text:p>
          <text:list>
            <text:list-item>
              <text:p text:style-name="P19">erstellt einen ssh-key</text:p>
            </text:list-item>
            <text:list-item>
              <text:p text:style-name="P20">-t ed25519 <text:span text:style-name="T23">(setzt verschlüsselungsalgorithmus <text:s/>ed22519 <text:s/>ein)</text:span></text:p>
            </text:list-item>
            <text:list-item>
              <text:p text:style-name="P20">-<text:span text:style-name="T24">C „kommentar“ als optionaler kommentar</text:span></text:p>
            </text:list-item>
            <text:list-item>
              <text:p text:style-name="P20"><text:span text:style-name="T24">f für einen Dateipfad ~/.ssh/key_name (standardverzeichnis für ssh-keys)</text:span> <text:s text:c="19"/></text:p>
            </text:list-item>
          </text:list>
        </text:list-item>
        <text:list-item>
          <text:p text:style-name="P23">eval "$(ssh-agent -s)"</text:p>
          <text:list>
            <text:list-item>
              <text:p text:style-name="P24">öffnet den ssh-key manager</text:p>
            </text:list-item>
          </text:list>
        </text:list-item>
        <text:list-item>
          <text:p text:style-name="P18"><text:span text:style-name="T16">ssh-add ~/.ssh/</text:span><text:span text:style-name="T15">id_ed25519_github </text:span><text:s/>(als Beispielkey, der Name kann variieren)</text:p>
          <text:list>
            <text:list-item>
              <text:p text:style-name="P18">fügt den key in das „wallet“ oder „key-manager-schlüsselbrett</text:p>
            </text:list-item>
          </text:list>
        </text:list-item>
        <text:list-item>
          <text:p text:style-name="P18"><text:span text:style-name="T21">nano</text:span><text:span text:style-name="T6"> ~/.ssh/config </text:span></text:p>
          <text:list>
            <text:list-item>
              <text:p text:style-name="P18"><text:span text:style-name="T10"># GitHub <text:line-break/>Host github.com <text:line-break/>HostName github.com <text:line-break/></text:span><text:soft-page-break/><text:span text:style-name="T10">User git<text:line-break/>IdentityFile ~/.ssh/id_ed25519_github</text:span></text:p>
            </text:list-item>
            <text:list-item>
              <text:p text:style-name="P18"><text:span text:style-name="T13">o</text:span><text:span text:style-name="T10">hne SSH-Config verwendet SSH automatisch die </text:span><text:span text:style-name="Strong_20_Emphasis">Standard-Keys</text:span><text:span text:style-name="T10"> in folgender Reihenfolge: </text:span><text:span text:style-name="T13">1.rsa 2.ed25519 3.ecdsa 4.dsa</text:span></text:p>
            </text:list-item>
          </text:list>
        </text:list-item>
      </text:list>
      <text:p text:style-name="P5"/>
      <text:list xml:id="list131809952335482" text:continue-numbering="true" text:style-name="L4">
        <text:list-item>
          <text:p text:style-name="P25"><text:span text:style-name="T22">cat</text:span><text:span text:style-name="T2"> ~/.ssh/id_ed25519_github.pub </text:span><text:span text:style-name="T3"><text:s text:c="8"/></text:span></text:p>
          <text:list>
            <text:list-item>
              <text:p text:style-name="P26"><text:span text:style-name="T3">k</text:span><text:span text:style-name="T1">opiere die ganze Ausgabe des Public-key und füge über die GitHub GUI hinzu</text:span></text:p>
            </text:list-item>
            <text:list-item>
              <text:p text:style-name="P26"><text:s text:c="17"/></text:p>
            </text:list-item>
          </text:list>
        </text:list-item>
      </text:list>
      <text:p text:style-name="P5"/>
      <text:p text:style-name="P5"/>
      <text:p text:style-name="P5"/>
      <text:p text:style-name="P5"><text:a xlink:type="simple" xlink:href="https://docs.gitlab.com/user/project/repository/web_editor/#create-a-file" text:style-name="Internet_20_link" text:visited-style-name="Visited_20_Internet_20_Link">https://docs.gitlab.com/user/project/repository/web_editor/#create-a-file</text:a> </text:p>
      <text:p text:style-name="P5"><draw:frame draw:style-name="fr1" draw:name="Bild1" text:anchor-type="char" svg:x="0.079cm" svg:y="1.646cm" svg:width="16.365cm" svg:height="9.204cm" draw:z-index="0"><draw:image xlink:href="Pictures/100000010000078000000438257EF809B2A55E1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8T09:01:24.526052674</meta:creation-date>
    <dc:date>2026-05-08T13:18:09.376302797</dc:date>
    <meta:editing-duration>PT1H4S</meta:editing-duration>
    <meta:editing-cycles>14</meta:editing-cycles>
    <meta:generator>LibreOffice/7.3.7.2$Linux_X86_64 LibreOffice_project/30$Build-2</meta:generator>
    <meta:document-statistic meta:table-count="0" meta:image-count="1" meta:object-count="0" meta:page-count="2" meta:paragraph-count="49" meta:word-count="296" meta:character-count="2371" meta:non-whitespace-character-count="1684"/>
  </office:meta>
</office:document-meta>
</file>